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paragraph-rsid="00078979"/>
    </style:style>
    <style:style style:name="P2" style:family="paragraph" style:parent-style-name="Standard" style:list-style-name="L2">
      <style:paragraph-properties fo:text-align="justify" style:justify-single-word="false"/>
      <style:text-properties officeooo:paragraph-rsid="00078979"/>
    </style:style>
    <style:style style:name="P3" style:family="paragraph" style:parent-style-name="Standard" style:list-style-name="L3">
      <style:paragraph-properties fo:text-align="justify" style:justify-single-word="false"/>
      <style:text-properties officeooo:paragraph-rsid="00078979"/>
    </style:style>
    <style:style style:name="P4" style:family="paragraph" style:parent-style-name="Standard" style:list-style-name="L3">
      <style:paragraph-properties fo:text-align="justify" style:justify-single-word="false"/>
      <style:text-properties officeooo:paragraph-rsid="00097bb6"/>
    </style:style>
    <style:style style:name="P5" style:family="paragraph" style:parent-style-name="Standard" style:list-style-name="L5">
      <style:paragraph-properties fo:text-align="justify" style:justify-single-word="false"/>
      <style:text-properties officeooo:paragraph-rsid="00097bb6"/>
    </style:style>
    <style:style style:name="P6" style:family="paragraph" style:parent-style-name="Standard">
      <style:paragraph-properties fo:text-align="justify" style:justify-single-word="false"/>
      <style:text-properties officeooo:rsid="00078979" officeooo:paragraph-rsid="00078979"/>
    </style:style>
    <style:style style:name="P7" style:family="paragraph" style:parent-style-name="Standard" style:list-style-name="L2">
      <style:paragraph-properties fo:text-align="justify" style:justify-single-word="false"/>
      <style:text-properties officeooo:rsid="00078979" officeooo:paragraph-rsid="00078979"/>
    </style:style>
    <style:style style:name="P8" style:family="paragraph" style:parent-style-name="Standard">
      <style:paragraph-properties fo:text-align="justify" style:justify-single-word="false"/>
      <style:text-properties fo:font-size="14pt" officeooo:rsid="00078979" officeooo:paragraph-rsid="00078979" style:font-size-asian="14pt" style:font-size-complex="14pt"/>
    </style:style>
    <style:style style:name="P9" style:family="paragraph" style:parent-style-name="Standard" style:list-style-name="L3">
      <style:paragraph-properties fo:text-align="justify" style:justify-single-word="false"/>
      <style:text-properties fo:font-size="14pt" officeooo:rsid="00078979" officeooo:paragraph-rsid="00078979" style:font-size-asian="14pt" style:font-size-complex="14pt"/>
    </style:style>
    <style:style style:name="P10" style:family="paragraph" style:parent-style-name="Standard" style:list-style-name="L3">
      <style:paragraph-properties fo:text-align="justify" style:justify-single-word="false"/>
      <style:text-properties fo:font-size="14pt" officeooo:rsid="00097bb6" officeooo:paragraph-rsid="00097bb6" style:font-size-asian="14pt" style:font-size-complex="14pt"/>
    </style:style>
    <style:style style:name="P11" style:family="paragraph" style:parent-style-name="Standard">
      <style:paragraph-properties fo:text-align="justify" style:justify-single-word="false"/>
      <style:text-properties fo:font-size="14pt" officeooo:rsid="00097bb6" officeooo:paragraph-rsid="00097bb6" style:font-size-asian="14pt" style:font-size-complex="14pt"/>
    </style:style>
    <style:style style:name="P12" style:family="paragraph" style:parent-style-name="Standard" style:list-style-name="L4">
      <style:paragraph-properties fo:text-align="justify" style:justify-single-word="false"/>
      <style:text-properties fo:font-size="14pt" officeooo:rsid="00097bb6" officeooo:paragraph-rsid="00097bb6" style:font-size-asian="14pt" style:font-size-complex="14pt"/>
    </style:style>
    <style:style style:name="P13" style:family="paragraph" style:parent-style-name="Standard" style:list-style-name="L4">
      <style:paragraph-properties fo:text-align="justify" style:justify-single-word="false"/>
      <style:text-properties fo:font-size="14pt" officeooo:rsid="000b27bd" officeooo:paragraph-rsid="000b27bd" style:font-size-asian="14pt" style:font-size-complex="14pt"/>
    </style:style>
    <style:style style:name="P14" style:family="paragraph" style:parent-style-name="Standard">
      <style:paragraph-properties fo:text-align="justify" style:justify-single-word="false"/>
      <style:text-properties fo:font-size="14pt" officeooo:rsid="000b27bd" officeooo:paragraph-rsid="000b27bd" style:font-size-asian="14pt" style:font-size-complex="14pt"/>
    </style:style>
    <style:style style:name="P15" style:family="paragraph" style:parent-style-name="Standard" style:list-style-name="L6">
      <style:paragraph-properties fo:text-align="justify" style:justify-single-word="false"/>
      <style:text-properties fo:font-size="14pt" officeooo:rsid="000b27bd" officeooo:paragraph-rsid="000b27bd" style:font-size-asian="14pt" style:font-size-complex="14pt"/>
    </style:style>
    <style:style style:name="P16" style:family="paragraph" style:parent-style-name="Standard" style:list-style-name="L1">
      <style:paragraph-properties fo:text-align="justify" style:justify-single-word="false"/>
      <style:text-properties fo:font-size="14pt" officeooo:rsid="000cb73b" officeooo:paragraph-rsid="000cb73b" style:font-size-asian="14pt" style:font-size-complex="14pt"/>
    </style:style>
    <style:style style:name="P17" style:family="paragraph" style:parent-style-name="Standard" style:list-style-name="L7">
      <style:paragraph-properties fo:text-align="justify" style:justify-single-word="false"/>
      <style:text-properties fo:font-size="14pt" officeooo:rsid="000cb73b" officeooo:paragraph-rsid="000cb73b" style:font-size-asian="14pt" style:font-size-complex="14pt"/>
    </style:style>
    <style:style style:name="P18" style:family="paragraph" style:parent-style-name="Standard" style:list-style-name="L8">
      <style:paragraph-properties fo:text-align="justify" style:justify-single-word="false"/>
      <style:text-properties fo:font-size="14pt" officeooo:rsid="000cb73b" officeooo:paragraph-rsid="000cb73b" style:font-size-asian="14pt" style:font-size-complex="14pt"/>
    </style:style>
    <style:style style:name="P19" style:family="paragraph" style:parent-style-name="Standard" style:list-style-name="L8">
      <style:paragraph-properties fo:text-align="justify" style:justify-single-word="false"/>
      <style:text-properties fo:font-size="14pt" officeooo:rsid="000d640b" officeooo:paragraph-rsid="000d640b" style:font-size-asian="14pt" style:font-size-complex="14pt"/>
    </style:style>
    <style:style style:name="P20" style:family="paragraph" style:parent-style-name="Standard">
      <style:paragraph-properties fo:text-align="justify" style:justify-single-word="false"/>
      <style:text-properties fo:font-size="14pt" officeooo:rsid="000d640b" officeooo:paragraph-rsid="000d640b" style:font-size-asian="14pt" style:font-size-complex="14pt"/>
    </style:style>
    <style:style style:name="P21" style:family="paragraph" style:parent-style-name="Standard" style:list-style-name="L8">
      <style:paragraph-properties fo:text-align="justify" style:justify-single-word="false"/>
      <style:text-properties fo:font-size="14pt" officeooo:rsid="000e020e" officeooo:paragraph-rsid="000e020e" style:font-size-asian="14pt" style:font-size-complex="14pt"/>
    </style:style>
    <style:style style:name="P22" style:family="paragraph" style:parent-style-name="Standard" style:list-style-name="L1">
      <style:paragraph-properties fo:text-align="justify" style:justify-single-word="false"/>
      <style:text-properties fo:font-size="14pt" fo:font-weight="bold" officeooo:rsid="00078979" officeooo:paragraph-rsid="00078979" style:font-size-asian="14pt" style:font-weight-asian="bold" style:font-size-complex="14pt" style:font-weight-complex="bold"/>
    </style:style>
    <style:style style:name="P23" style:family="paragraph" style:parent-style-name="Standard">
      <style:paragraph-properties fo:text-align="center" style:justify-single-word="false"/>
      <style:text-properties fo:font-size="14pt" fo:font-weight="bold" officeooo:rsid="00078979" officeooo:paragraph-rsid="00078979" style:font-size-asian="14pt" style:font-weight-asian="bold" style:font-size-complex="14pt" style:font-weight-complex="bold"/>
    </style:style>
    <style:style style:name="P24" style:family="paragraph" style:parent-style-name="Standard" style:list-style-name="L1">
      <style:paragraph-properties fo:text-align="justify" style:justify-single-word="false"/>
      <style:text-properties fo:font-size="14pt" fo:font-weight="bold" officeooo:rsid="00097bb6" officeooo:paragraph-rsid="00097bb6" style:font-size-asian="14pt" style:font-weight-asian="bold" style:font-size-complex="14pt" style:font-weight-complex="bold"/>
    </style:style>
    <style:style style:name="P25" style:family="paragraph" style:parent-style-name="Standard" style:list-style-name="L1">
      <style:paragraph-properties fo:text-align="justify" style:justify-single-word="false"/>
      <style:text-properties fo:font-size="14pt" fo:font-weight="bold" officeooo:rsid="000b27bd" officeooo:paragraph-rsid="000b27bd" style:font-size-asian="14pt" style:font-weight-asian="bold" style:font-size-complex="14pt" style:font-weight-complex="bold"/>
    </style:style>
    <style:style style:name="P26" style:family="paragraph" style:parent-style-name="Standard" style:list-style-name="L1">
      <style:paragraph-properties fo:text-align="justify" style:justify-single-word="false"/>
      <style:text-properties fo:font-size="14pt" fo:font-weight="bold" officeooo:rsid="000cb73b" officeooo:paragraph-rsid="000cb73b" style:font-size-asian="14pt" style:font-weight-asian="bold" style:font-size-complex="14pt" style:font-weight-complex="bold"/>
    </style:style>
    <style:style style:name="P27" style:family="paragraph" style:parent-style-name="Standard" style:list-style-name="L3">
      <style:paragraph-properties fo:text-align="justify" style:justify-single-word="false"/>
      <style:text-properties fo:font-size="14pt" officeooo:rsid="00097bb6" officeooo:paragraph-rsid="00097bb6" style:font-size-asian="12.25pt" style:font-size-complex="14pt"/>
    </style:style>
    <style:style style:name="P28" style:family="paragraph" style:parent-style-name="Standard">
      <style:paragraph-properties fo:text-align="justify" style:justify-single-word="false"/>
      <style:text-properties fo:font-size="14pt" officeooo:rsid="00097bb6" officeooo:paragraph-rsid="00097bb6" style:font-size-asian="12.25pt" style:font-size-complex="14pt"/>
    </style:style>
    <style:style style:name="P29" style:family="paragraph" style:parent-style-name="Standard">
      <style:paragraph-properties fo:text-align="justify" style:justify-single-word="false"/>
      <style:text-properties officeooo:rsid="00097bb6" officeooo:paragraph-rsid="00097bb6"/>
    </style:style>
    <style:style style:name="T1" style:family="text">
      <style:text-properties officeooo:rsid="00078979"/>
    </style:style>
    <style:style style:name="T2" style:family="text">
      <style:text-properties fo:font-size="14pt" officeooo:rsid="00078979" style:font-size-asian="14pt" style:font-size-complex="14pt"/>
    </style:style>
    <style:style style:name="T3" style:family="text">
      <style:text-properties fo:font-size="14pt" officeooo:rsid="00097bb6" style:font-size-asian="14pt" style:font-size-complex="14pt"/>
    </style:style>
    <style:style style:name="T4" style:family="text">
      <style:text-properties officeooo:rsid="00097bb6"/>
    </style:style>
    <style:style style:name="T5" style:family="text">
      <style:text-properties officeooo:rsid="000d640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RAPPORT PORTFOLIO UI/UX</text:p>
      <text:p text:style-name="P6"/>
      <text:list xml:id="list358738099" text:style-name="L1">
        <text:list-item>
          <text:p text:style-name="P22">Informations</text:p>
        </text:list-item>
      </text:list>
      <text:p text:style-name="P8"/>
      <text:list xml:id="list2741879226" text:style-name="L2">
        <text:list-header>
          <text:p text:style-name="P2"><text:span text:style-name="T1">Nom : PRISO PRISO PAULIN ARNOLD</text:span></text:p>
          <text:p text:style-name="P7"/>
          <text:p text:style-name="P2"><text:span text:style-name="T1">Numéro étudiant : 300415757</text:span></text:p>
          <text:p text:style-name="P2"/>
          <text:p text:style-name="P2"><text:span text:style-name="T2">Titre du rapport : Rapport de conception UI/UX</text:span></text:p>
        </text:list-header>
      </text:list>
      <text:p text:style-name="P1"><text:span text:style-name="T2"/></text:p>
      <text:list xml:id="list213422098045865" text:continue-list="list358738099" text:style-name="L1">
        <text:list-item>
          <text:p text:style-name="P22">Expérience en JavaScript et apprentissage</text:p>
        </text:list-item>
      </text:list>
      <text:p text:style-name="P8"/>
      <text:list xml:id="list2634044862" text:style-name="L3">
        <text:list-header>
          <text:p text:style-name="P9">Avant ce projet, mon expérience en JavaScript était déjà bonne vu que j’avais déjà quelques notions. J’avais déjà utilisé HTML et CSS pour réaliser de petites interfaces graphiques web simples, mais je n’avais pas encore une grande expérience dans la création de projets web complets et interactifs.</text:p>
          <text:p text:style-name="P9"/>
          <text:p text:style-name="P9">Pour réaliser ce portfolio, j’ai principalement utilisé HTML, CSS et Bootstrap afin de construire une interface moderne et responsive. </text:p>
          <text:p text:style-name="P9"/>
          <text:p text:style-name="P9">Afin d’acquérir les compétences nécessaires à la réalisation de ce projet, j’ai consulté plusieurs ressources d’apprentissage en ligne :</text:p>
          <text:p text:style-name="P9"/>
        </text:list-header>
        <text:list-item>
          <text:p text:style-name="P3"><text:span text:style-name="T2">Documentation officielle de Bootstrap : </text:span><text:a xlink:type="simple" xlink:href="https://getbootstrap.com/" text:style-name="Internet_20_link" text:visited-style-name="Visited_20_Internet_20_Link">https://getbootstrap.com/</text:a> </text:p>
        </text:list-item>
        <text:list-item>
          <text:p text:style-name="P3"><text:span text:style-name="T2">Documentation MDN Web Docs :</text:span><text:span text:style-name="T1"> </text:span><text:a xlink:type="simple" xlink:href="https://developer.mozilla.org/" text:style-name="Internet_20_link" text:visited-style-name="Visited_20_Internet_20_Link">https://developer.mozilla.org</text:a> </text:p>
        </text:list-item>
        <text:list-item>
          <text:p text:style-name="P4"><text:span text:style-name="T3">Interaction Design Foundation :</text:span><text:span text:style-name="T4"> </text:span><text:a xlink:type="simple" xlink:href="https://www.interaction-design.org/" text:style-name="Internet_20_link" text:visited-style-name="Visited_20_Internet_20_Link">https://www.interaction-design.org/</text:a> </text:p>
        </text:list-item>
        <text:list-item>
          <text:p text:style-name="P10">Tutoriels YouTube sur HTML/CSS/Bootstrap et design UI/UX</text:p>
        </text:list-item>
      </text:list>
      <text:p text:style-name="P29"/>
      <text:list xml:id="list213421554148249" text:continue-numbering="true" text:style-name="L3">
        <text:list-header>
          <text:p text:style-name="P27">Ces ressources m’ont permis de mieux comprendre les principes fondamentaux du développement frontend ainsi que les notions importantes liées à la communication visuelle.</text:p>
        </text:list-header>
      </text:list>
      <text:p text:style-name="P28"/>
      <text:list xml:id="list213422474063475" text:continue-list="list213422098045865" text:style-name="L1">
        <text:list-item>
          <text:p text:style-name="P24">Sites de portfolio ayant servi d’inspiration</text:p>
        </text:list-item>
      </text:list>
      <text:p text:style-name="P11"/>
      <text:list xml:id="list2467779769" text:style-name="L5">
        <text:list-item>
          <text:p text:style-name="P5"><text:a xlink:type="simple" xlink:href="https://brittanychiang.com/" text:style-name="Internet_20_link" text:visited-style-name="Visited_20_Internet_20_Link"><text:span text:style-name="T3">https://brittanychiang.com/</text:span></text:a><text:span text:style-name="T3"> </text:span></text:p>
        </text:list-item>
      </text:list>
      <text:list xml:id="list4061110217" text:style-name="L4">
        <text:list-header>
          <text:p text:style-name="P12"/>
          <text:p text:style-name="P12">J’ai aimé la simplicité du design ainsi que l’utilisation d’une palette de couleurs cohérente. La hiérarchie visuelle est claire et la navigation est intuitive. Les sections sont bien organisées et les espaces vides permettent une meilleure lisibilité.</text:p>
          <text:p text:style-name="P12"/>
          <text:p text:style-name="P13">Ce portfolio m’a inspiré dans l’utilisation d’un design minimaliste avec des sections bien séparées et une navigation simple.</text:p>
        </text:list-header>
        <text:list-item>
          <text:p text:style-name="P13"><text:soft-page-break/><text:a xlink:type="simple" xlink:href="https://bruno-simon.com/" text:style-name="Internet_20_link" text:visited-style-name="Visited_20_Internet_20_Link">https://bruno-simon.com/</text:a> </text:p>
          <text:p text:style-name="P13"/>
          <text:p text:style-name="P13">Ce portfolio est très créatif et interactif. Il démontre qu’un portfolio peut refléter la personnalité du concepteur.</text:p>
          <text:p text:style-name="P13"/>
          <text:p text:style-name="P13">Même si le site est impressionnant visuellement, certaines interactions peuvent rendre la navigation moins simple pour certains utilisateurs.</text:p>
          <text:p text:style-name="P13"/>
          <text:p text:style-name="P13">Ce portfolio m’a montré l’importance de créer une identité visuelle personnelle tout en gardant une interface compréhensible.</text:p>
          <text:p text:style-name="P13"/>
        </text:list-item>
        <text:list-item>
          <text:p text:style-name="P13"><text:a xlink:type="simple" xlink:href="https://www.seanhalpin.design/" text:style-name="Internet_20_link" text:visited-style-name="Visited_20_Internet_20_Link">https://www.seanhalpin.design/</text:a> </text:p>
          <text:p text:style-name="P13"/>
          <text:p text:style-name="P13">J’ai apprécié l’équilibre entre simplicité, couleurs douces et bonne hiérarchie visuelle. Le contenu est facile à lire et les animations sont discrètes</text:p>
          <text:p text:style-name="P13"/>
          <text:p text:style-name="P13">Ce site m’a inspiré dans le choix d’un design clair et moderne avec des couleurs harmonieuses.</text:p>
          <text:p text:style-name="P13"/>
        </text:list-item>
      </text:list>
      <text:list xml:id="list213422151142324" text:continue-list="list213422474063475" text:style-name="L1">
        <text:list-item>
          <text:p text:style-name="P25">Lien vers l’interface utilisateur</text:p>
        </text:list-item>
      </text:list>
      <text:p text:style-name="P14"/>
      <text:list xml:id="list2041398316" text:style-name="L6">
        <text:list-header>
          <text:p text:style-name="P15"><text:a xlink:type="simple" xlink:href="https://ppris062.github.io/seg3525-portfolio/" text:style-name="Internet_20_link" text:visited-style-name="Visited_20_Internet_20_Link">https://ppris062.github.io/seg3525-portfolio/</text:a> </text:p>
        </text:list-header>
      </text:list>
      <text:p text:style-name="P14"/>
      <text:list xml:id="list213421908137781" text:continue-list="list213422151142324" text:style-name="L1">
        <text:list-item>
          <text:p text:style-name="P26">Lien vers le code</text:p>
        </text:list-item>
      </text:list>
      <text:list xml:id="list2978730539" text:style-name="L7">
        <text:list-header>
          <text:p text:style-name="P17"/>
          <text:p text:style-name="P17"><text:a xlink:type="simple" xlink:href="https://github.com/PPRIS062/seg3525-portfolio" text:style-name="Internet_20_link" text:visited-style-name="Visited_20_Internet_20_Link">https://github.com/PPRIS062/seg3525-portfolio</text:a> </text:p>
          <text:p text:style-name="P17"/>
        </text:list-header>
      </text:list>
      <text:list xml:id="list213422539716533" text:continue-list="list213421908137781" text:style-name="L1">
        <text:list-item>
          <text:p text:style-name="P26">Description des choix de conception</text:p>
          <text:p text:style-name="P16"/>
        </text:list-item>
      </text:list>
      <text:list xml:id="list3881744032" text:style-name="L8">
        <text:list-item>
          <text:p text:style-name="P18">Couleurs : palette de couleurs composée principalement de tons verts foncés et verts clairs.</text:p>
          <text:p text:style-name="P18"/>
          <text:p text:style-name="P18">#1F6F5F</text:p>
          <text:p text:style-name="P18">#185748</text:p>
          <text:p text:style-name="P18">#2FA084</text:p>
          <text:p text:style-name="P18">#6FCF97</text:p>
          <text:p text:style-name="P18"/>
          <text:p text:style-name="P18">J’ai choisi cette palette parce qu’elle donne une apparence moderne, <text:span text:style-name="T5">professionnelle et apaisante. Les couleurs vertes créent une identité visuelle cohérente et permettent de transmettre une impression de calme et de créativité.</text:span></text:p>
        </text:list-item>
      </text:list>
      <text:p text:style-name="P20"/>
      <text:p text:style-name="P20"/>
      <text:list xml:id="list213421596801814" text:continue-numbering="true" text:style-name="L8">
        <text:list-item>
          <text:p text:style-name="P19"><text:soft-page-break/>Typographie : j’ai utilisé deux polices Google Fonts</text:p>
          <text:p text:style-name="P19"/>
          <text:p text:style-name="P19">Poppins : pour les titres</text:p>
          <text:p text:style-name="P19"/>
          <text:p text:style-name="P19">Inter : pour les paragraphes et le contenu général.</text:p>
          <text:p text:style-name="P19"/>
        </text:list-item>
        <text:list-item>
          <text:p text:style-name="P19">Disposition de l’écran (layout) : organisé en plusieurs sections verticales.</text:p>
          <text:p text:style-name="P19"/>
          <text:p text:style-name="P19">Section principale «main»</text:p>
          <text:p text:style-name="P19">Section «A propos»</text:p>
          <text:p text:style-name="P19">Section «Mon approche»</text:p>
          <text:p text:style-name="P19">Section «Mes projets»</text:p>
          <text:p text:style-name="P19">Pied de page</text:p>
          <text:p text:style-name="P19"/>
        </text:list-item>
        <text:list-item>
          <text:p text:style-name="P19">Hiérarchie visuelle : J’ai utilisé une grande section principale avec un titre important afin d’attirer immédiatement l’attention sur mon identité et mon rôle. Les titres des sections utilisent une taille plus grande et une police différente afin de guider naturellement l’utilisateur dans la lecture.</text:p>
          <text:p text:style-name="P21"/>
        </text:list-item>
        <text:list-item>
          <text:p text:style-name="P21">Échelle : Les éléments importants, comme mon nom, les boutons et les titres, utilisent une taille plus grande pour montrer leur importance. Les éléments secondaires utilisent des tailles plus petites afin de créer une hiérarchie claire.</text:p>
          <text:p text:style-name="P21"/>
        </text:list-item>
        <text:list-item>
          <text:p text:style-name="P21">Contraste : J’ai utilisé des couleurs sombres pour les arrière-plans et des couleurs claires pour le texte afin d’assurer une bonne lisibilité. Les boutons utilisent également des couleurs plus vives afin d’attirer l’attention et de montrer les interactions possibles.</text:p>
          <text:p text:style-name="P21"/>
        </text:list-item>
        <text:list-item>
          <text:p text:style-name="P21">Équilibre : Le portfolio utilise une grille Bootstrap afin de maintenir un bon alignement et un équilibre visuel entre les images, les textes et les différentes sections. Dans la section principale, le texte et la photo sont répartis de manière équilibrée sur l’écran.</text:p>
          <text:p text:style-name="P21"/>
        </text:list-item>
        <text:list-item>
          <text:p text:style-name="P21">Navigation : La barre de navigation fixe permet un accès rapide aux différentes sections du portfolio grâce aux ancres. Le défilement fluide améliore également l’expérience utilisateur.</text:p>
          <text:p text:style-name="P19"/>
          <text:p text:style-name="P19"/>
        </text:list-item>
      </text:list>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4T20:33:36.968361678</meta:creation-date>
    <dc:date>2026-05-24T21:34:20.060597945</dc:date>
    <meta:editing-duration>PT6M7S</meta:editing-duration>
    <meta:editing-cycles>1</meta:editing-cycles>
    <meta:document-statistic meta:table-count="0" meta:image-count="0" meta:object-count="0" meta:page-count="3" meta:paragraph-count="79" meta:word-count="691" meta:character-count="4470" meta:non-whitespace-character-count="3898"/>
    <meta:generator>LibreOffice/7.3.7.2$Linux_X86_64 LibreOffice_project/30$Build-2</meta:generator>
  </office:meta>
</office:document-meta>
</file>